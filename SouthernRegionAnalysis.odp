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8">
      <style:graphic-properties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>
      <style:graphic-properties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3">
      <style:graphic-properties/>
    </style:style>
  </office:automatic-styles>
  <office:body>
    <office:presentation>
      <draw:page draw:name="Slide8" draw:style-name="a777" draw:master-page-name="Master1-Layout7-blank-Blank" presentation:presentation-page-layout-name="Master1-PPL7" draw:id="Slide-263">
        <draw:custom-shape svg:x="0in" svg:y="0in" svg:width="13.33333in" svg:height="7.49931in" draw:id="id69" draw:style-name="a780" draw:name="Rectangle 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5in" svg:height="0.16665in" draw:id="id70" draw:style-name="a783" draw:transform="translate(-1.75in -0.08332in) rotate(-1.5708) translate(0.36076in 3.76801in)" draw:name="Rectangle 8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5.22424in" draw:id="id71" draw:style-name="a786" draw:transform="translate(-3.75in -2.61212in) rotate(-4.71239) translate(10.72121in 3.74999in)" draw:name="Rectangle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2423in" svg:y="0.93809in" svg:width="12.10304in" svg:height="5.69656in" draw:id="id72" draw:style-name="a789" draw:name="Rectangle 12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93" draw:name="TextBox 1" svg:x="1.05673in" svg:y="2.38626in" svg:width="10.83803in" svg:height="2.83249in">
          <draw:text-box>
            <text:p text:style-name="a792" text:class-names="" text:cond-style-name=""><text:span text:style-name="a790" text:class-names="">Q2 Sales &amp; Product Trends <text:line-break/></text:span><text:span text:style-name="a791" text:class-names=""/></text:p>
          </draw:text-box>
          <svg:title/>
          <svg:desc/>
        </draw:frame>
        <draw:custom-shape svg:width="3.5in" svg:height="0.16665in" draw:id="id74" draw:style-name="a796" draw:transform="translate(-1.75in -0.08332in) rotate(-1.5708) translate(0.08332in 3.76456in)" draw:name="Rectangle 14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797" draw:master-page-name="Master1-Layout7-blank-Blank" presentation:presentation-page-layout-name="Master1-PPL7" draw:id="Slide-261">
        <draw:frame draw:id="id75" draw:style-name="a798" draw:name="Chart 1" svg:x="-0in" svg:y="1.34058in" svg:width="6.66667in" svg:height="5.37589in" style:rel-width="scale" style:rel-height="scale">
          <draw:object xlink:href="Object 1/" xlink:type="simple" xlink:show="embed" xlink:actuate="onLoad"/>
          <svg:title/>
          <svg:desc/>
        </draw:frame>
        <draw:frame draw:id="id76" draw:style-name="a802" draw:name="TextBox 3" svg:x="4.07326in" svg:y="0.3813in" svg:width="5.18682in" svg:height="0.63952in">
          <draw:text-box>
            <text:p text:style-name="a801" text:class-names="" text:cond-style-name=""><text:span text:style-name="a799" text:class-names="">Q2 SALES COMPARISON</text:span><text:span text:style-name="a800" text:class-names=""/></text:p>
          </draw:text-box>
          <svg:title/>
          <svg:desc/>
        </draw:frame>
        <draw:frame draw:id="id77" draw:style-name="a803" draw:name="Chart 4" svg:x="6.66667in" svg:y="0.97364in" svg:width="6.46599in" svg:height="5.37589in" style:rel-width="scale" style:rel-height="scale">
          <draw:object xlink:href="Object 2/" xlink:type="simple" xlink:show="embed" xlink:actuate="onLoad"/>
          <svg:title/>
          <svg:desc/>
        </draw:frame>
        <draw:frame draw:id="id78" draw:style-name="a812" draw:name="TextBox 5" svg:x="3.13605in" svg:y="6.71866in" svg:width="7.76191in" svg:height="0.63952in">
          <draw:text-box>
            <text:p text:style-name="a811" text:class-names="" text:cond-style-name=""><text:span text:style-name="a804" text:class-names="">Looking</text:span><text:span text:style-name="a805" text:class-names=""><text:s text:c="1"/></text:span><text:span text:style-name="a806" text:class-names="">at</text:span><text:span text:style-name="a807" text:class-names=""><text:s text:c="1"/></text:span><text:span text:style-name="a808" text:class-names="">both years side by side, 2025 had much stronger Q2 sales overall, with the MacBook pro, while the MSI creator was the top seller in 2024</text:span><text:span text:style-name="a809" text:class-names="">.<text:s text:c="1"/></text:span><text:span text:style-name="a810" text:class-names=""/></text:p>
          </draw:text-box>
          <svg:title/>
          <svg:desc/>
        </draw:frame>
      </draw:page>
      <draw:page draw:name="Slide7" draw:style-name="a813" draw:master-page-name="Master1-Layout7-blank-Blank" presentation:presentation-page-layout-name="Master1-PPL7" draw:id="Slide-262">
        <draw:frame draw:id="id79" draw:style-name="a814" draw:name="Chart 1" svg:x="0.92753in" svg:y="1.73731in" svg:width="11.47826in" svg:height="5.0854in" style:rel-width="scale" style:rel-height="scale">
          <draw:object xlink:href="Object 3/" xlink:type="simple" xlink:show="embed" xlink:actuate="onLoad"/>
          <svg:title/>
          <svg:desc/>
        </draw:frame>
        <draw:frame draw:id="id80" draw:style-name="a818" draw:name="TextBox 2" svg:x="4.62206in" svg:y="0.19173in" svg:width="4.08921in" svg:height="1.17806in">
          <draw:text-box>
            <text:p text:style-name="a817" text:class-names="" text:cond-style-name=""><text:span text:style-name="a815" text:class-names="">Q2 TOP PRODUCTS BY QUANTITY<text:s text:c="1"/></text:span><text:span text:style-name="a816" text:class-names=""/></text:p>
          </draw:text-box>
          <svg:title/>
          <svg:desc/>
        </draw:frame>
        <draw:frame draw:id="id81" draw:style-name="a822" draw:name="TextBox 3" svg:x="2.21376in" svg:y="6.82271in" svg:width="8.90579in" svg:height="0.63952in">
          <draw:text-box>
            <text:p text:style-name="a821" text:class-names="" text:cond-style-name=""><text:span text:style-name="a819" text:class-names="">The previous slide highlighted top revenue, this slide focuses on products with the highest unit sales.<text:s text:c="1"/></text:span><text:span text:style-name="a8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3f3f3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5.6684in" svg:y="1.07986in" svg:width="6.75in" svg:height="5.32986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0.9184in" svg:y="2.25in" svg:width="4.30035in" svg:height="4.168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57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9.41667in" svg:y="6.95139in" svg:width="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91667in" svg:y="0.39931in" svg:width="11.5in" svg:height="1.44965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91667in" svg:y="1.99653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/></text:span><text:span text:style-name="a667" text:class-names=""/></text:p>
        </draw:text-box>
        <svg:title/>
        <svg:desc/>
      </draw:frame>
      <draw:frame draw:id="id62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9.54167in" svg:y="0.39931in" svg:width="2.875in" svg:height="6.3559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91667in" svg:y="0.39931in" svg:width="8.45833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91667in" svg:y="6.95139in" svg:width="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67" presentation:style-name="a739" draw:name="Footer Placeholder 4" svg:x="4.41667in" svg:y="6.95139in" svg:width="4.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9.41667in" svg:y="6.95139in" svg:width="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ondra martinez</meta:initial-creator>
    <dc:creator>alondra martinez</dc:creator>
    <meta:creation-date>2026-05-01T02:28:19Z</meta:creation-date>
    <dc:date>2026-05-01T03:25:24Z</dc:date>
    <meta:template xlink:href="Office%20Theme" xlink:type="simple"/>
    <meta:editing-cycles>1</meta:editing-cycles>
    <meta:editing-duration>PT3424S</meta:editing-duration>
    <meta:document-statistic meta:paragraph-count="9" meta:word-count="8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80" chart:overlap="8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87.0642519685039pt" svg:width="480.0000787401575pt" chart:style-name="Crt0">
        <chart:title svg:x="167.3645669291339pt" svg:y="0.718188976377953pt" chart:style-name="CT00">
          <text:p text:style-name="a0" text:class-names="" text:cond-style-name="">Q2 TOP SALES<text:line-break/>2024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/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Samsung Galaxy Tab S9 Ultra</text:p>
            </table:table-cell>
            <table:table-cell office:value-type="float" office:value="1430"/>
          </table:table-row>
          <table:table-row>
            <table:table-cell office:value-type="string">
              <text:p>Dell Latitude 7320 Detachable</text:p>
            </table:table-cell>
            <table:table-cell office:value-type="float" office:value="1705.88"/>
          </table:table-row>
          <table:table-row>
            <table:table-cell office:value-type="string">
              <text:p>Apple MacBook Pro (M2, 14-inch)</text:p>
            </table:table-cell>
            <table:table-cell office:value-type="float" office:value="1717.7"/>
          </table:table-row>
          <table:table-row>
            <table:table-cell office:value-type="string">
              <text:p>Teclast T40 Pro</text:p>
            </table:table-cell>
            <table:table-cell office:value-type="float" office:value="2795.2"/>
          </table:table-row>
          <table:table-row>
            <table:table-cell office:value-type="string">
              <text:p>MSI Creator Z16</text:p>
            </table:table-cell>
            <table:table-cell office:value-type="float" office:value="3527.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80" chart:overlap="8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87.0642519685039pt" svg:width="465.5509448818898pt" chart:style-name="Crt0">
        <chart:title svg:x="186.5704724409449pt" svg:y="22.65259842519685pt" chart:style-name="CT00">
          <text:p text:style-name="a0" text:class-names="" text:cond-style-name="">Q2 TOP SALES<text:line-break/>2025</text:p>
        </chart:title>
        <chart:plot-area svg:x="14.74748031496063pt" svg:y="92.78307086614173pt" svg:width="442.9515748031496pt" svg:height="288.663937007874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/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cer Chromebook Spin 713</text:p>
            </table:table-cell>
            <table:table-cell office:value-type="float" office:value="2588.6"/>
          </table:table-row>
          <table:table-row>
            <table:table-cell office:value-type="string">
              <text:p>HP Pavilion 14</text:p>
            </table:table-cell>
            <table:table-cell office:value-type="float" office:value="2603.7600000000002"/>
          </table:table-row>
          <table:table-row>
            <table:table-cell office:value-type="string">
              <text:p>Microsoft Surface Pro 9</text:p>
            </table:table-cell>
            <table:table-cell office:value-type="float" office:value="3260"/>
          </table:table-row>
          <table:table-row>
            <table:table-cell office:value-type="string">
              <text:p>LG Gram 17</text:p>
            </table:table-cell>
            <table:table-cell office:value-type="float" office:value="5505.76"/>
          </table:table-row>
          <table:table-row>
            <table:table-cell office:value-type="string">
              <text:p>Apple MacBook Pro (M2, 14-inch)</text:p>
            </table:table-cell>
            <table:table-cell office:value-type="float" office:value="6870.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2" draw:style="linear" draw:angle="0" draw:start-color="#497491" draw:end-color="#106287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tru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2f2f2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36">
      <style:chart-properties chart:symbol-type="none" chart:vertical="true" chart:connect-bars="false" chart:solid-type="cuboid" chart:stacked="false" chart:percentage="true" chart:link-data-style-to-source="false" chart:data-label-number="value" chart:data-label-text="false" chart:data-label-symbol="false" chart:label-position="center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156082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2f2f2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3">
      <style:chart-properties chart:gap-width="150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false" chart:percentage="true" chart:auto-position="false"/>
      <style:graphic-properties draw:fill="none" draw:stroke="none"/>
    </style:style>
  </office:automatic-styles>
  <office:body>
    <office:chart>
      <chart:chart chart:class="chart:bar" svg:height="366.1486614173228pt" svg:width="826.4347244094488pt" chart:style-name="Crt0">
        <chart:title svg:x="348.4807086614173pt" svg:y="14.95574803149606pt" chart:style-name="CT00">
          <text:p text:style-name="a0" text:class-names="" text:cond-style-name="">Q2 TOP PRODUCTS <text:line-break/>2025</text:p>
        </chart:title>
        <chart:plot-area svg:x="65.62795275590551pt" svg:y="63.10251968503937pt" svg:width="747.3014173228346pt" svg:height="291.2951968503937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2"/>
            <chart:data-point chart:style-name="G0S0P2">
              <chart:data-label svg:x="358.4034645669291pt" svg:y="199.9251181102362pt" chart:style-name="DL002"/>
            </chart:data-point>
            <chart:data-point chart:repeated="2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QuantitySold</text:p>
              </table:table-cell>
              <table:table-cell office:value-type="string">
                <text:p>TotalRevenue</text:p>
              </table:table-cell>
            </table:table-row>
          </table:table-header-rows>
          <table:table-row>
            <table:table-cell office:value-type="string">
              <text:p>Canson XL Mixed Media Sketchbook (9x12 inches)</text:p>
            </table:table-cell>
            <table:table-cell office:value-type="float" office:value="5"/>
            <table:table-cell office:value-type="float" office:value="50.5"/>
          </table:table-row>
          <table:table-row>
            <table:table-cell office:value-type="string">
              <text:p>LTCA Year Up Coffee Mug (Ceramic, White)</text:p>
            </table:table-cell>
            <table:table-cell office:value-type="float" office:value="5"/>
            <table:table-cell office:value-type="float" office:value="60.6"/>
          </table:table-row>
          <table:table-row>
            <table:table-cell office:value-type="string">
              <text:p>TCL NXTPAPER 10s</text:p>
            </table:table-cell>
            <table:table-cell office:value-type="float" office:value="5"/>
            <table:table-cell office:value-type="float" office:value="4417.3999999999996"/>
          </table:table-row>
          <table:table-row>
            <table:table-cell office:value-type="string">
              <text:p>Day Designer Daily Planner (Undated)</text:p>
            </table:table-cell>
            <table:table-cell office:value-type="float" office:value="4"/>
            <table:table-cell office:value-type="float" office:value="20.96"/>
          </table:table-row>
          <table:table-row>
            <table:table-cell office:value-type="string">
              <text:p>Heavy-Duty Hole Punch (3 Hole)</text:p>
            </table:table-cell>
            <table:table-cell office:value-type="float" office:value="4"/>
            <table:table-cell office:value-type="float" office:value="52.5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